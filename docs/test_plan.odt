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326C0000324F0000129354668253.svg" manifest:media-type="image/svg+xml"/>
  <manifest:file-entry manifest:full-path="Pictures/10000001000001E7000000B423F46238.png" manifest:media-type="image/png"/>
  <manifest:file-entry manifest:full-path="Pictures/1000000100000123000000BEE6F310DF.png" manifest:media-type="image/png"/>
  <manifest:file-entry manifest:full-path="Pictures/1000250900001E0E000013A45EC64749.svg" manifest:media-type="image/svg+xml"/>
  <manifest:file-entry manifest:full-path="Pictures/1000000100000123000000D640D92128.png" manifest:media-type="image/png"/>
  <manifest:file-entry manifest:full-path="Pictures/1000308000001E0E0000162926D73084.svg" manifest:media-type="image/svg+xml"/>
  <manifest:file-entry manifest:full-path="Pictures/10001C4500001E0E000009EF4E1C3F39.svg" manifest:media-type="image/svg+xml"/>
  <manifest:file-entry manifest:full-path="Pictures/10000001000000620000005EA1D6A8D2.png" manifest:media-type="image/png"/>
  <manifest:file-entry manifest:full-path="Pictures/1000000100000123000000601DF4E6E3.png" manifest:media-type="image/png"/>
  <manifest:file-entry manifest:full-path="Pictures/10000D6900000A17000009BAEFF5C78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wiss" style:font-pitch="variable"/>
    <style:font-face style:name="Bitstream Vera Serif" svg:font-family="'Bitstream Vera Serif'" style:font-family-generic="roman" style:font-pitch="variable" style:font-charset="x-symbol"/>
    <style:font-face style:name="Bitstream Vera Serif1" svg:font-family="'Bitstream Vera Serif'" style:font-family-generic="roman" style:font-pitch="variable"/>
    <style:font-face style:name="CaskaydiaCove NFM" svg:font-family="'CaskaydiaCove NFM'" style:font-family-generic="roman" style:font-pitch="variable"/>
    <style:font-face style:name="CaskaydiaCove NFM1" svg:font-family="'CaskaydiaCove NFM'" style:font-family-generic="system" style:font-pitch="variable"/>
    <style:font-face style:name="CaskaydiaCove NFP" svg:font-family="'CaskaydiaCove NFP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 style:font-charset="x-symbol"/>
    <style:font-face style:name="OpenSymbol2" svg:font-family="OpenSymbol" style:font-family-generic="system" style:font-pitch="variable" style:font-charset="x-symbol"/>
    <style:font-face style:name="Symbol" svg:font-family="Symbol" style:font-family-generic="system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9993in" style:rel-column-width="18919*"/>
    </style:style>
    <style:style style:name="Table1.B" style:family="table-column">
      <style:table-column-properties style:column-width="4.9257in" style:rel-column-width="46616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1.2875in" fo:keep-together="auto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1.1653in" fo:keep-together="auto"/>
    </style:style>
    <style:style style:name="Table1.4" style:family="table-row">
      <style:table-row-properties style:min-row-height="1.4153in" fo:keep-together="auto"/>
    </style:style>
    <style:style style:name="Table1.5" style:family="table-row">
      <style:table-row-properties style:min-row-height="2.0063in" fo:keep-together="auto"/>
    </style:style>
    <style:style style:name="Table1.6" style:family="table-row">
      <style:table-row-properties style:min-row-height="1.2229in" fo:keep-together="auto"/>
    </style:style>
    <style:style style:name="P1" style:family="paragraph" style:parent-style-name="Title">
      <style:paragraph-properties fo:margin-top="0.1665in" fo:margin-bottom="0.0835in" style:contextual-spacing="false" style:writing-mode="lr-tb"/>
      <style:text-properties style:font-name="Times New Roman"/>
    </style:style>
    <style:style style:name="P2" style:family="paragraph" style:parent-style-name="Heading_20_2" style:list-style-name="WWNum1">
      <style:paragraph-properties fo:margin-left="0in" fo:text-align="left" style:justify-single-word="false" fo:text-indent="0in" style:auto-text-indent="false" style:writing-mode="lr-tb"/>
      <style:text-properties style:font-name="Times New Roman"/>
    </style:style>
    <style:style style:name="P3" style:family="paragraph" style:parent-style-name="Text_20_body">
      <style:paragraph-properties fo:text-align="left" style:justify-single-word="false" style:writing-mode="lr-tb"/>
    </style:style>
    <style:style style:name="P4" style:family="paragraph" style:parent-style-name="Heading_20_2" style:list-style-name="WWNum1">
      <style:paragraph-properties fo:margin-left="0in" fo:text-align="left" style:justify-single-word="false" fo:text-indent="0in" style:auto-text-indent="false" style:writing-mode="lr-tb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Heading_20_2" style:list-style-name="WWNum1"/>
    <style:style style:name="P7" style:family="paragraph" style:parent-style-name="Table_20_Contents">
      <style:paragraph-properties fo:text-align="left" style:justify-single-word="false" style:writing-mode="lr-tb"/>
      <style:text-properties style:font-name="Times New Roman"/>
    </style:style>
    <style:style style:name="P8" style:family="paragraph" style:parent-style-name="Изобр.">
      <style:paragraph-properties fo:margin-top="0.0835in" fo:margin-bottom="0.0835in" style:contextual-spacing="false" fo:text-align="center" style:justify-single-word="false" style:writing-mode="lr-tb"/>
      <style:text-properties style:font-name="Times New Roman"/>
    </style:style>
    <style:style style:name="P9" style:family="paragraph" style:parent-style-name="Caption">
      <style:paragraph-properties fo:margin-top="0.0835in" fo:margin-bottom="0.0835in" style:contextual-spacing="false" fo:text-align="center" style:justify-single-word="false" style:writing-mode="lr-tb"/>
      <style:text-properties officeooo:paragraph-rsid="000a7f79"/>
    </style:style>
    <style:style style:name="P10" style:family="paragraph">
      <loext:graphic-properties draw:fill="solid" draw:fill-color="#ffffff"/>
      <style:paragraph-properties fo:text-align="left"/>
      <style:text-properties fo:font-size="18pt"/>
    </style:style>
    <style:style style:name="P11" style:family="paragraph" style:parent-style-name="Caption">
      <style:paragraph-properties fo:margin-top="0.0835in" fo:margin-bottom="0.0835in" style:contextual-spacing="false" fo:text-align="center" style:justify-single-word="false" style:writing-mode="lr-tb"/>
    </style:style>
    <style:style style:name="P12" style:family="paragraph" style:parent-style-name="Text_20_body">
      <style:paragraph-properties fo:text-align="left" style:justify-single-word="false" style:writing-mode="lr-tb"/>
      <style:text-properties style:font-name="Times New Roman"/>
    </style:style>
    <style:style style:name="P13" style:family="paragraph" style:parent-style-name="Text_20_body" style:list-style-name="WWNum2">
      <style:paragraph-properties fo:text-align="left" style:justify-single-word="false" style:writing-mode="lr-tb"/>
    </style:style>
    <style:style style:name="P14" style:family="paragraph" style:parent-style-name="Text_20_body" style:list-style-name="WWNum2">
      <style:paragraph-properties fo:text-align="left" style:justify-single-word="false" style:writing-mode="lr-tb"/>
      <style:text-properties style:font-name="Times New Roman"/>
    </style:style>
    <style:style style:name="P15" style:family="paragraph" style:parent-style-name="Text_20_body" style:list-style-name="WWNum2">
      <style:paragraph-properties fo:margin-top="0in" fo:margin-bottom="0.0972in" style:contextual-spacing="false" fo:text-align="left" style:justify-single-word="false" style:writing-mode="lr-tb"/>
      <style:text-properties style:font-name="Times New Roman"/>
    </style:style>
    <style:style style:name="P16" style:family="paragraph" style:parent-style-name="Heading_20_3">
      <style:paragraph-properties fo:margin-top="0in" fo:margin-bottom="0.0972in" style:contextual-spacing="false" fo:text-align="left" style:justify-single-word="false" style:writing-mode="lr-tb"/>
      <style:text-properties style:font-name="Times New Roman" fo:font-size="12pt" style:font-name-asian="CaskaydiaCove NFP" style:font-size-asian="12pt" style:font-name-complex="CaskaydiaCove NFP" style:font-size-complex="12pt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style:font-name="Times New Roman"/>
    </style:style>
    <style:style style:name="P19" style:family="paragraph" style:parent-style-name="Text_20_body" style:list-style-name="L1">
      <style:text-properties style:font-name="Times New Roman"/>
    </style:style>
    <style:style style:name="P20" style:family="paragraph" style:parent-style-name="Text_20_body" style:list-style-name="L2">
      <style:paragraph-properties fo:margin-top="0in" fo:margin-bottom="0in" style:contextual-spacing="false"/>
      <style:text-properties style:font-name="Times New Roman"/>
    </style:style>
    <style:style style:name="P21" style:family="paragraph" style:parent-style-name="Text_20_body" style:list-style-name="L2">
      <style:text-properties style:font-name="Times New Roman"/>
    </style:style>
    <style:style style:name="P22" style:family="paragraph" style:parent-style-name="Heading_20_1">
      <style:paragraph-properties fo:margin-top="0in" fo:margin-bottom="0.0972in" style:contextual-spacing="false" fo:text-align="left" style:justify-single-word="false" style:writing-mode="lr-tb"/>
      <style:text-properties style:font-name="Times New Roman" fo:font-size="12pt" style:font-size-asian="12pt" style:font-size-complex="12pt"/>
    </style:style>
    <style:style style:name="P23" style:family="paragraph" style:parent-style-name="Heading_20_3">
      <style:paragraph-properties fo:margin-top="0in" fo:margin-bottom="0.0972in" style:contextual-spacing="false" fo:line-height="115%"/>
      <style:text-properties style:font-name="Times New Roman" fo:font-size="12pt" style:font-name-asian="CaskaydiaCove NFP" style:font-size-asian="12pt" style:font-name-complex="CaskaydiaCove NFP" style:font-size-complex="12pt"/>
    </style:style>
    <style:style style:name="P24" style:family="paragraph" style:parent-style-name="Text_20_body" style:list-style-name="L3">
      <style:paragraph-properties fo:margin-top="0in" fo:margin-bottom="0in" style:contextual-spacing="false"/>
      <style:text-properties style:font-name="Times New Roman"/>
    </style:style>
    <style:style style:name="P25" style:family="paragraph" style:parent-style-name="Text_20_body" style:list-style-name="L3">
      <style:text-properties style:font-name="Times New Roman"/>
    </style:style>
    <style:style style:name="P26" style:family="paragraph" style:parent-style-name="Text_20_body" style:list-style-name="L4">
      <style:paragraph-properties fo:margin-top="0in" fo:margin-bottom="0in" style:contextual-spacing="false"/>
      <style:text-properties style:font-name="Times New Roman"/>
    </style:style>
    <style:style style:name="P27" style:family="paragraph" style:parent-style-name="Text_20_body" style:list-style-name="L4">
      <style:text-properties style:font-name="Times New Roman"/>
    </style:style>
    <style:style style:name="P28" style:family="paragraph" style:parent-style-name="Text_20_body" style:list-style-name="L5">
      <style:paragraph-properties fo:margin-top="0in" fo:margin-bottom="0in" style:contextual-spacing="false"/>
      <style:text-properties style:font-name="Times New Roman"/>
    </style:style>
    <style:style style:name="P29" style:family="paragraph" style:parent-style-name="Text_20_body" style:list-style-name="L5">
      <style:text-properties style:font-name="Times New Roman"/>
    </style:style>
    <style:style style:name="P30" style:family="paragraph" style:parent-style-name="Text_20_body" style:list-style-name="L6">
      <style:paragraph-properties fo:margin-top="0in" fo:margin-bottom="0in" style:contextual-spacing="false"/>
      <style:text-properties style:font-name="Times New Roman"/>
    </style:style>
    <style:style style:name="P31" style:family="paragraph" style:parent-style-name="Text_20_body" style:list-style-name="L6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officeooo:rsid="000b76ff" style:font-name-asian="CaskaydiaCove NFP" style:font-size-asian="16pt" style:font-name-complex="CaskaydiaCove NFP" style:font-size-complex="16pt"/>
    </style:style>
    <style:style style:name="T3" style:family="text">
      <style:text-properties style:font-name="Times New Roman" fo:font-size="16pt" style:font-size-asian="16pt" style:font-size-complex="16pt"/>
    </style:style>
    <style:style style:name="T4" style:family="text">
      <style:text-properties style:font-name="Times New Roman" officeooo:rsid="000b76ff"/>
    </style:style>
    <style:style style:name="T5" style:family="text">
      <style:text-properties style:use-window-font-color="true" loext:opacity="0%" fo:background-color="transparent" loext:char-shading-value="0"/>
    </style:style>
    <style:style style:name="T6" style:family="text">
      <style:text-properties style:use-window-font-color="true" loext:opacity="0%" style:font-name="Times New Roman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1.1909in" fo:min-width="1.7118in" fo:padding-top="0in" fo:padding-bottom="0in" fo:padding-left="0in" fo:padding-right="0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ragraph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1.0161in" fo:min-width="1.9043in" fo:padding-top="0in" fo:padding-bottom="0in" fo:padding-left="0in" fo:padding-right="0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ragraph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false" fo:min-height="1.6811in" fo:min-width="1.9043in" fo:padding-top="0in" fo:padding-bottom="0in" fo:padding-left="0in" fo:padding-right="0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ragraph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1.7543in" fo:min-width="1.9236in" fo:padding-top="0in" fo:padding-bottom="0in" fo:padding-left="0in" fo:padding-right="0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ragraph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9953in" fo:min-width="1.9236in" fo:padding-top="0in" fo:padding-bottom="0in" fo:padding-left="0in" fo:padding-right="0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лан тестирования</text:p>
      <text:list text:style-name="WWNum1">
        <text:list-item>
          <text:list>
            <text:list-item>
              <text:h text:style-name="P2" text:outline-level="2">Тестирование Модели</text:h>
            </text:list-item>
          </text:list>
        </text:list-item>
      </text:list>
      <text:p text:style-name="P3"><text:span text:style-name="T1">Базовые проверки корректности методов класса Graph: Graph.addVertex(), Graph.removeVertex(), Graph.addEdge(), Graph.getVerticec(), Graph.getEdges(), Graph.getIncidentEdges(), Edge.getOtherEnd().</text:span></text:p>
      <text:list text:continue-numbering="true" text:style-name="WWNum1">
        <text:list-item>
          <text:list>
            <text:list-item>
              <text:h text:style-name="P4" text:outline-level="2"><text:span text:style-name="Source_20_Text"><text:span text:style-name="T1">Тестирование swing-окна</text:span></text:span></text:h>
            </text:list-item>
          </text:list>
        </text:list-item>
      </text:list>
      <text:p text:style-name="P5"><text:span text:style-name="Source_20_Text"><text:span text:style-name="T1">1. При запуске программы открывается окно.</text:span></text:span></text:p>
      <text:p text:style-name="P5"><text:span text:style-name="Source_20_Text"><text:span text:style-name="T1">2. При закрытие окна программа завершается.</text:span></text:span></text:p>
      <text:p text:style-name="P3"><text:span text:style-name="Source_20_Text"><text:span text:style-name="T1">3. Размер окна соответсвует ожидаемому.</text:span></text:span></text:p>
      <text:p text:style-name="P3"><text:span text:style-name="Source_20_Text"><text:span text:style-name="T1">4. Панель инструментов и области рисования отображаются.</text:span></text:span></text:p>
      <text:p text:style-name="P3"><text:span text:style-name="Source_20_Text"><text:span text:style-name="T1">5. Кнопки добавления и удаления вершин отображаются.</text:span></text:span></text:p>
      <text:list text:continue-numbering="true" text:style-name="WWNum1">
        <text:list-item>
          <text:list>
            <text:list-item>
              <text:h text:style-name="P6" text:outline-level="2"><text:span text:style-name="Source_20_Text"><text:span text:style-name="T2">Версия 1. Т</text:span></text:span><text:span text:style-name="Source_20_Text"><text:span text:style-name="T3">естирование алгоритма Дейкстры</text:span></text:span></text:h>
            </text:list-item>
          </text:list>
        </text:list-item>
      </text:list>
      <text:p text:style-name="P3"><text:span text:style-name="Source_20_Text"><text:span text:style-name="T1">Проверять, что после каждого шага корректно изменяются расстояния, очередь обновляется, следующая вершина выбрана правильно.</text:span></text:span></text:p>
      <text:p text:style-name="P3"><text:span text:style-name="Source_20_Text"><text:span text:style-name="T1">Полагая A стартовой вершиной протестируем алгоритм на графах.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Граф</text:p>
          </table:table-cell>
          <table:table-cell table:style-name="Table1.B1" office:value-type="string">
            <text:p text:style-name="P7">Результат</text:p>
          </table:table-cell>
        </table:table-row>
        <table:table-row table:style-name="Table1.2">
          <table:table-cell table:style-name="Table1.A2" office:value-type="string">
            <text:p text:style-name="P8"><draw:custom-shape text:anchor-type="as-char" style:rel-width="89%" draw:z-index="0" draw:name="Frame1" draw:style-name="gr1" draw:text-style-name="P10" svg:width="1.7114in" svg:height="1.1906in"><text:p text:style-name="P9"><draw:frame draw:style-name="fr1" draw:name="Image2 Copy 1" text:anchor-type="as-char" svg:width="0.5984in" svg:height="0.5799in" draw:z-index="10"><draw:image xlink:href="Pictures/10000D6900000A17000009BAEFF5C786.svg" xlink:type="simple" xlink:show="embed" xlink:actuate="onLoad" draw:mime-type="image/svg+xml"/><draw:image xlink:href="Pictures/10000001000000620000005EA1D6A8D2.png" xlink:type="simple" xlink:show="embed" xlink:actuate="onLoad" draw:mime-type="image/png"/></draw:frame></text:p><text:p text:style-name="P9">Одновершинный граф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1.B2" office:value-type="string">
            <text:p text:style-name="P7">A = 0</text:p>
          </table:table-cell>
        </table:table-row>
        <table:table-row table:style-name="Table1.3">
          <table:table-cell table:style-name="Table1.A2" office:value-type="string">
            <text:p text:style-name="P8"><draw:custom-shape text:anchor-type="as-char" style:rel-width="99%" draw:z-index="1" draw:name="Frame7" draw:style-name="gr2" draw:text-style-name="P10" svg:width="1.9039in" svg:height="1.0157in"><text:p text:style-name="P11"><draw:frame draw:style-name="fr1" draw:name="Image1 Copy 1" text:anchor-type="as-char" svg:width="1.9035in" svg:height="0.7374in" draw:z-index="11"><draw:image xlink:href="Pictures/10001C4500001E0E000009EF4E1C3F39.svg" xlink:type="simple" xlink:show="embed" xlink:actuate="onLoad" draw:mime-type="image/svg+xml"/><draw:image xlink:href="Pictures/1000000100000123000000601DF4E6E3.png" xlink:type="simple" xlink:show="embed" xlink:actuate="onLoad" draw:mime-type="image/png"/></draw:frame>Цепь из двух вершин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1.B2" office:value-type="string">
            <text:p text:style-name="P7">A = 0</text:p>
            <text:p text:style-name="P7">B = 5</text:p>
          </table:table-cell>
        </table:table-row>
        <text:soft-page-break/>
        <table:table-row table:style-name="Table1.4">
          <table:table-cell table:style-name="Table1.A2" office:value-type="string">
            <text:p text:style-name="P8"><draw:custom-shape text:anchor-type="as-char" style:rel-width="99%" draw:z-index="2" draw:name="Frame5" draw:style-name="gr3" draw:text-style-name="P10" svg:width="1.9039in" svg:height="1.6807in"><text:p text:style-name="P11"><draw:frame draw:style-name="fr1" draw:name="Image3 Copy 1" text:anchor-type="as-char" svg:width="1.9035in" svg:height="1.4028in" draw:z-index="12"><draw:image xlink:href="Pictures/1000308000001E0E0000162926D73084.svg" xlink:type="simple" xlink:show="embed" xlink:actuate="onLoad" draw:mime-type="image/svg+xml"/><draw:image xlink:href="Pictures/1000000100000123000000D640D92128.png" xlink:type="simple" xlink:show="embed" xlink:actuate="onLoad" draw:mime-type="image/png"/></draw:frame>Два пути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1.B2" office:value-type="string">
            <text:p text:style-name="P7">A = 0</text:p>
            <text:p text:style-name="P7">B = 5</text:p>
            <text:p text:style-name="P7">C = 8</text:p>
          </table:table-cell>
        </table:table-row>
        <table:table-row table:style-name="Table1.5">
          <table:table-cell table:style-name="Table1.A2" office:value-type="string">
            <text:p text:style-name="P8"><draw:custom-shape text:anchor-type="as-char" style:rel-width="100%" draw:z-index="3" draw:name="Frame3" draw:style-name="gr4" draw:text-style-name="P10" svg:width="1.9232in" svg:height="1.7539in"><text:p text:style-name="P11"><draw:frame draw:style-name="fr1" draw:name="Image4 Copy 1" text:anchor-type="as-char" svg:width="1.9228in" svg:height="1.2563in" draw:z-index="13"><draw:image xlink:href="Pictures/1000250900001E0E000013A45EC64749.svg" xlink:type="simple" xlink:show="embed" xlink:actuate="onLoad" draw:mime-type="image/svg+xml"/><draw:image xlink:href="Pictures/1000000100000123000000BEE6F310DF.png" xlink:type="simple" xlink:show="embed" xlink:actuate="onLoad" draw:mime-type="image/png"/></draw:frame>Недостижимая вершина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1.B2" office:value-type="string">
            <text:p text:style-name="P7">A = 0</text:p>
            <text:p text:style-name="P7">B = 5</text:p>
            <text:p text:style-name="P7">C = infty</text:p>
          </table:table-cell>
        </table:table-row>
        <table:table-row table:style-name="Table1.6">
          <table:table-cell table:style-name="Table1.A2" office:value-type="string">
            <text:p text:style-name="P8"><draw:custom-shape text:anchor-type="as-char" style:rel-width="100%" draw:z-index="4" draw:name="Frame2" draw:style-name="gr5" draw:text-style-name="P10" svg:width="1.9232in" svg:height="0.9949in"><text:p text:style-name="P11"><draw:frame draw:style-name="fr1" draw:name="Image5 Copy 1" text:anchor-type="as-char" svg:width="1.9228in" svg:height="0.7083in" draw:z-index="14"><draw:image xlink:href="Pictures/1000326C0000324F0000129354668253.svg" xlink:type="simple" xlink:show="embed" xlink:actuate="onLoad" draw:mime-type="image/svg+xml"/><draw:image xlink:href="Pictures/10000001000001E7000000B423F46238.png" xlink:type="simple" xlink:show="embed" xlink:actuate="onLoad" draw:mime-type="image/png"/></draw:frame>Цикл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1.B2" office:value-type="string">
            <text:p text:style-name="P7">A = 0</text:p>
            <text:p text:style-name="P7">B = 5</text:p>
            <text:p text:style-name="P7">C = 10</text:p>
          </table:table-cell>
        </table:table-row>
      </table:table>
      <text:p text:style-name="P3"><text:span text:style-name="Source_20_Text"><text:span text:style-name="T1">Проверить, что алгоритм завершает работу, появляется сообщение о завершении работы.</text:span></text:span></text:p>
      <text:p text:style-name="P3"><text:span text:style-name="Source_20_Text"><text:span text:style-name="T1">Проверить, что алгоритм повторно запускается.</text:span></text:span></text:p>
      <text:list xml:id="list140661401400421" text:continue-numbering="true" text:style-name="WWNum1">
        <text:list-item>
          <text:list>
            <text:list-item>
              <text:h text:style-name="P4" text:outline-level="2"><text:span text:style-name="Source_20_Text"><text:span text:style-name="T4">Версия 2. </text:span></text:span><text:span text:style-name="Source_20_Text"><text:span text:style-name="T1">Визуализация</text:span></text:span></text:h>
            </text:list-item>
          </text:list>
        </text:list-item>
      </text:list>
      <text:p text:style-name="P3"><text:span text:style-name="Source_20_Text"><text:span text:style-name="T1">Проверить корректность обработки исключительных ситуаций при вводе некорректных данных, т. е. необходимо реализовать исключения.</text:span></text:span></text:p>
      <text:p text:style-name="P12"><text:span text:style-name="T5">При добавлении</text:span> вершины проверяется нет ли вершины с тем же именем.</text:p>
      <text:p text:style-name="P12">При удалении вершины проверяется, что только этой вершины больше нет в графе, все инцидентные ребра этой вершины удалены. При удалении не существующей обрабатывается NoSuchElementException.</text:p>
      <text:p text:style-name="P12"><text:span text:style-name="T5">При добавлении</text:span> ребра проверяется, что не появляется петель, weight &gt; 0, не мультиребро (нет ребра с теми же концами), существуют обе вершины-концы в самом списке вершин графа.</text:p>
      <text:p text:style-name="P3"><text:span text:style-name="T1">При удалении </text:span><text:span text:style-name="Source_20_Text"><text:span text:style-name="T6">несуществующего ребра</text:span></text:span><text:span text:style-name="T1"> выводится NoSuchElementException</text:span><text:span text:style-name="T6">.</text:span></text:p>
      <text:p text:style-name="P3"><text:span text:style-name="Source_20_Text"><text:span text:style-name="T1">На всех некорректных аргументах выводится IllegalArgumentException.</text:span></text:span></text:p>
      <text:p text:style-name="P3"><text:span text:style-name="Source_20_Text"><text:span text:style-name="T1">Проверить корректность</text:span></text:span></text:p>
      <text:list text:style-name="WWNum2">
        <text:list-item>
          <text:p text:style-name="P13"><text:soft-page-break/><text:span text:style-name="Source_20_Text"><text:span text:style-name="T1">подсветки текущей вершины и рассматриваемых соседей,</text:span></text:span></text:p>
        </text:list-item>
        <text:list-item>
          <text:p text:style-name="P14">отображения промежуточных расстояний,</text:p>
        </text:list-item>
        <text:list-item>
          <text:p text:style-name="P14">отображения дерева кратчайших путей,</text:p>
        </text:list-item>
        <text:list-item>
          <text:p text:style-name="P15">отображения кратчайшего пути после завершения алгоритма.</text:p>
        </text:list-item>
      </text:list>
      <text:h text:style-name="P16" text:outline-level="3">Запуск алгоритма</text:h>
      <text:p text:style-name="P17">Проверяется:</text:p>
      <text:list text:style-name="L1">
        <text:list-item>
          <text:p text:style-name="P18">выбор стартовой вершины; </text:p>
        </text:list-item>
        <text:list-item>
          <text:p text:style-name="P18">запуск в пошаговом режиме; </text:p>
        </text:list-item>
        <text:list-item>
          <text:p text:style-name="P18">запуск в мгновенном режиме; </text:p>
        </text:list-item>
        <text:list-item>
          <text:p text:style-name="P18">корректность вычисленных расстояний; </text:p>
        </text:list-item>
        <text:list-item>
          <text:p text:style-name="P18">обработка графов с недостижимыми вершинами; </text:p>
        </text:list-item>
        <text:list-item>
          <text:p text:style-name="P18">корректное завершение алгоритма; </text:p>
        </text:list-item>
        <text:list-item>
          <text:p text:style-name="P19">повторный запуск алгоритма.</text:p>
        </text:list-item>
      </text:list>
      <text:h text:style-name="P16" text:outline-level="3">Просмотр кратчайшего пути</text:h>
      <text:p text:style-name="P17">Проверяется:</text:p>
      <text:list text:style-name="L2">
        <text:list-item>
          <text:p text:style-name="P20">выбор конечной вершины; </text:p>
        </text:list-item>
        <text:list-item>
          <text:p text:style-name="P20">корректная подсветка найденного пути; </text:p>
        </text:list-item>
        <text:list-item>
          <text:p text:style-name="P20">вывод длины пути; </text:p>
        </text:list-item>
        <text:list-item>
          <text:p text:style-name="P21">обработка случая отсутствия пути.</text:p>
        </text:list-item>
      </text:list>
      <text:list text:continue-list="list140661401400421" text:style-name="WWNum1">
        <text:list-item>
          <text:h text:style-name="P22" text:outline-level="1">Проверка функций программы в различных состояниях</text:h>
        </text:list-item>
      </text:list>
      <text:h text:style-name="P23" text:outline-level="3">До загрузки (создания) графа</text:h>
      <text:p text:style-name="P17">Проверяется:</text:p>
      <text:list text:style-name="L3">
        <text:list-item>
          <text:p text:style-name="P24">невозможность запуска алгоритма; <text:s/></text:p>
        </text:list-item>
        <text:list-item>
          <text:p text:style-name="P24">доступность создания нового графа; </text:p>
        </text:list-item>
        <text:list-item>
          <text:p text:style-name="P25">корректная работа элементов интерфейса без данных. </text:p>
        </text:list-item>
      </text:list>
      <text:h text:style-name="P23" text:outline-level="3">После создания графа, до запуска алгоритма</text:h>
      <text:p text:style-name="P17">Проверяется:</text:p>
      <text:list text:style-name="L4">
        <text:list-item>
          <text:p text:style-name="P26">добавление и удаление вершин; </text:p>
        </text:list-item>
        <text:list-item>
          <text:p text:style-name="P26">добавление и удаление рёбер; <text:s/></text:p>
        </text:list-item>
        <text:list-item>
          <text:p text:style-name="P26">выбор стартовой вершины; </text:p>
        </text:list-item>
        <text:list-item>
          <text:p text:style-name="P27">переключение режима работы алгоритма. </text:p>
        </text:list-item>
      </text:list>
      <text:h text:style-name="P23" text:outline-level="3">Во время выполнения алгоритма</text:h>
      <text:p text:style-name="P17">Проверяется:</text:p>
      <text:list text:style-name="L5">
        <text:list-item>
          <text:p text:style-name="P28">корректность переходов между шагами; </text:p>
        </text:list-item>
        <text:list-item>
          <text:p text:style-name="P28"><text:soft-page-break/>обновление очереди; </text:p>
        </text:list-item>
        <text:list-item>
          <text:p text:style-name="P28">изменение промежуточных расстояний; </text:p>
        </text:list-item>
        <text:list-item>
          <text:p text:style-name="P28">подсветка текущей вершины; </text:p>
        </text:list-item>
        <text:list-item>
          <text:p text:style-name="P28">подсветка дерева кратчайших путей; </text:p>
        </text:list-item>
        <text:list-item>
          <text:p text:style-name="P29">отсутствие возможности изменять граф во время выполнения. </text:p>
        </text:list-item>
      </text:list>
      <text:h text:style-name="P23" text:outline-level="3">После завершения алгоритма</text:h>
      <text:p text:style-name="P17">Проверяется:</text:p>
      <text:list text:style-name="L6">
        <text:list-item>
          <text:p text:style-name="P30">отображение итоговых расстояний; </text:p>
        </text:list-item>
        <text:list-item>
          <text:p text:style-name="P30">просмотр кратчайшего пути; </text:p>
        </text:list-item>
        <text:list-item>
          <text:p text:style-name="P30">повторный запуск алгоритма; </text:p>
        </text:list-item>
        <text:list-item>
          <text:p text:style-name="P30">изменение графа после завершения; </text:p>
        </text:list-item>
        <text:list-item>
          <text:p text:style-name="P31">запуск алгоритма после изменения графа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wiss" style:font-pitch="variable"/>
    <style:font-face style:name="Bitstream Vera Serif" svg:font-family="'Bitstream Vera Serif'" style:font-family-generic="roman" style:font-pitch="variable" style:font-charset="x-symbol"/>
    <style:font-face style:name="Bitstream Vera Serif1" svg:font-family="'Bitstream Vera Serif'" style:font-family-generic="roman" style:font-pitch="variable"/>
    <style:font-face style:name="CaskaydiaCove NFM" svg:font-family="'CaskaydiaCove NFM'" style:font-family-generic="roman" style:font-pitch="variable"/>
    <style:font-face style:name="CaskaydiaCove NFM1" svg:font-family="'CaskaydiaCove NFM'" style:font-family-generic="system" style:font-pitch="variable"/>
    <style:font-face style:name="CaskaydiaCove NFP" svg:font-family="'CaskaydiaCove NFP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 style:font-charset="x-symbol"/>
    <style:font-face style:name="OpenSymbol2" svg:font-family="OpenSymbol" style:font-family-generic="system" style:font-pitch="variable" style:font-charset="x-symbol"/>
    <style:font-face style:name="Symbol" svg:font-family="Symbol" style:font-family-generic="system" style:font-pitch="variable" style:font-charset="x-symbol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Bitstream Vera Serif1" fo:font-size="12pt" fo:language="en" fo:country="US" style:letter-kerning="true" style:font-name-asian="CaskaydiaCove NFP" style:font-size-asian="12pt" style:language-asian="zh" style:country-asian="CN" style:font-name-complex="CaskaydiaCove NFP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Bitstream Vera Serif1" fo:font-size="12pt" fo:language="en" fo:country="US" style:letter-kerning="true" style:font-name-asian="CaskaydiaCove NFP" style:font-size-asian="12pt" style:language-asian="zh" style:country-asian="CN" style:font-name-complex="CaskaydiaCove NFP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Bitstream Vera Serif1" fo:font-family="'Bitstream Vera Serif'" style:font-family-generic="roman" style:font-pitch="variable" fo:font-size="12pt" fo:language="en" fo:country="US" style:letter-kerning="true" style:font-name-asian="CaskaydiaCove NFP" style:font-family-asian="'CaskaydiaCove NFP'" style:font-family-generic-asian="system" style:font-pitch-asian="variable" style:font-size-asian="12pt" style:language-asian="zh" style:country-asian="CN" style:font-name-complex="CaskaydiaCove NFP" style:font-family-complex="'CaskaydiaCove NFP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Bitstream Vera Sans" fo:font-family="'Bitstream Vera Sans'" style:font-family-generic="swiss" style:font-pitch="variable" fo:font-size="14pt" style:font-name-asian="CaskaydiaCove NFP" style:font-family-asian="'CaskaydiaCove NFP'" style:font-family-generic-asian="system" style:font-pitch-asian="variable" style:font-size-asian="14pt" style:font-name-complex="CaskaydiaCove NFP" style:font-family-complex="'CaskaydiaCove NFP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Изобр." style:family="paragraph" style:parent-style-name="Caption"/>
    <style:style style:name="Frame_20_Contents" style:display-name="Frame Contents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askaydiaCove NFM" fo:font-family="'CaskaydiaCove NFM'" style:font-family-generic="roman" style:font-pitch="variable" style:font-name-asian="CaskaydiaCove NFM1" style:font-family-asian="'CaskaydiaCove NFM'" style:font-family-generic-asian="system" style:font-pitch-asian="variable" style:font-name-complex="CaskaydiaCove NFM1" style:font-family-complex="'CaskaydiaCove NFM'" style:font-family-generic-complex="system" style:font-pitch-complex="variable"/>
    </style:style>
    <style:style style:name="Bullets" style:family="text">
      <style:text-properties style:font-name="OpenSymbol1" fo:font-family="OpenSymbol" style:font-family-generic="roman" style:font-pitch="variable" style:font-charset="x-symbol" style:font-name-asian="OpenSymbol2" style:font-family-asian="OpenSymbol" style:font-family-generic-asian="system" style:font-pitch-asian="variable" style:font-charset-asian="x-symbol" style:font-name-complex="OpenSymbol2" style:font-family-complex="OpenSymbol" style:font-family-generic-complex="system" style:font-pitch-complex="variable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Bitstream Vera Serif" fo:font-family="'Bitstream Vera Serif'" style:font-family-generic="roman" style:font-pitch="variable" style:font-charset="x-symbol" style:font-name-complex="Symbol" style:font-family-complex="Symbol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="Bitstream Vera Serif" fo:font-family="'Bitstream Vera Serif'" style:font-family-generic="roman" style:font-pitch="variable" style:font-charset="x-symbol" style:font-name-complex="OpenSymbol2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="Bitstream Vera Serif" fo:font-family="'Bitstream Vera Serif'" style:font-family-generic="roman" style:font-pitch="variable" style:font-charset="x-symbol" style:font-name-complex="OpenSymbol2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="Bitstream Vera Serif" fo:font-family="'Bitstream Vera Serif'" style:font-family-generic="roman" style:font-pitch="variable" style:font-charset="x-symbol" style:font-name-complex="Symbol" style:font-family-complex="Symbol" style:font-family-generic-complex="system" style:font-pitch-complex="variable" style:font-charset-complex="x-symbol"/>
    </style:style>
    <style:style style:name="ListLabel_20_14" style:display-name="ListLabel 14" style:family="text">
      <style:text-properties style:font-name="Bitstream Vera Serif" fo:font-family="'Bitstream Vera Serif'" style:font-family-generic="roman" style:font-pitch="variable" style:font-charset="x-symbol" style:font-name-complex="OpenSymbol2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="Bitstream Vera Serif" fo:font-family="'Bitstream Vera Serif'" style:font-family-generic="roman" style:font-pitch="variable" style:font-charset="x-symbol" style:font-name-complex="OpenSymbol2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="Bitstream Vera Serif" fo:font-family="'Bitstream Vera Serif'" style:font-family-generic="roman" style:font-pitch="variable" style:font-charset="x-symbol" style:font-name-complex="Symbol" style:font-family-complex="Symbol" style:font-family-generic-complex="system" style:font-pitch-complex="variable" style:font-charset-complex="x-symbol"/>
    </style:style>
    <style:style style:name="ListLabel_20_17" style:display-name="ListLabel 17" style:family="text">
      <style:text-properties style:font-name="Bitstream Vera Serif" fo:font-family="'Bitstream Vera Serif'" style:font-family-generic="roman" style:font-pitch="variable" style:font-charset="x-symbol" style:font-name-complex="OpenSymbol2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="Bitstream Vera Serif" fo:font-family="'Bitstream Vera Serif'" style:font-family-generic="roman" style:font-pitch="variable" style:font-charset="x-symbol" style:font-name-complex="OpenSymbol2" style:font-family-complex="OpenSymbol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2T21:15:34</meta:creation-date>
    <dc:language>en-US</dc:language>
    <meta:print-date>2026-07-13T00:13:01</meta:print-date>
    <dc:date>2026-07-18T14:06:59.570294604</dc:date>
    <meta:editing-cycles>4</meta:editing-cycles>
    <meta:editing-duration>PT44M55S</meta:editing-duration>
    <meta:generator>LibreOffice/26.2.4.2$Linux_X86_64 LibreOffice_project/620$Build-2</meta:generator>
    <meta:document-statistic meta:table-count="1" meta:image-count="5" meta:object-count="0" meta:page-count="4" meta:paragraph-count="93" meta:word-count="428" meta:character-count="3175" meta:non-whitespace-character-count="2839"/>
    <meta:user-defined meta:name="AppVersion">15.0000</meta:user-defined>
  </office:meta>
</office:document-meta>
</file>